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3.7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0cm" svg:height="4cm" svg:x="2cm" svg:y="2cm">
          <draw:text-box>
            <text:p>Hello from OctoConv E2E fixture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4"/>
    <meta:generator>LibreOffice/7.4.7.2$Linux_AARCH64 LibreOffice_project/40$Build-2</meta:generator>
  </office:meta>
</office:document-meta>
</file>