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from OctoConv E2E fixture.</text:p>
      <text:p text:style-name="Preformatted_20_Text">This is a minimal sample document used only for testing document convers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2" meta:word-count="17" meta:character-count="108" meta:non-whitespace-character-count="93"/>
    <meta:generator>LibreOffice/7.4.7.2$Linux_AARCH64 LibreOffice_project/40$Build-2</meta:generator>
  </office:meta>
</office:document-meta>
</file>